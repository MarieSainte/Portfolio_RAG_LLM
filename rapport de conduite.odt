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Standard">
      <style:paragraph-properties fo:margin-top="0.847cm" fo:margin-bottom="0.212cm" style:contextual-spacing="false" fo:line-height="100%" fo:keep-together="auto" style:page-number="1" fo:keep-with-next="auto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2" style:family="paragraph" style:parent-style-name="Horizontal_20_Line">
      <style:paragraph-properties fo:margin-top="0.847cm" fo:margin-bottom="0.212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3" style:family="paragraph" style:parent-style-name="Heading_20_2">
      <style:paragraph-properties fo:margin-top="0.847cm" fo:margin-bottom="0.212cm" style:contextual-spacing="false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4" style:family="paragraph" style:parent-style-name="Heading_20_3">
      <style:paragraph-properties fo:margin-top="0.847cm" fo:margin-bottom="0.212cm" style:contextual-spacing="false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top="0.847cm" fo:margin-bottom="0.212cm" style:contextual-spacing="false" fo:line-height="100%"/>
      <style:text-properties fo:font-size="23pt" fo:font-weight="bold" style:font-size-asian="23pt" style:font-weight-asian="bold" style:font-size-complex="23pt"/>
    </style:style>
    <style:style style:name="P6" style:family="paragraph" style:parent-style-name="Text_20_body">
      <style:paragraph-properties fo:margin-top="0.847cm" fo:margin-bottom="0.212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 style:list-style-name="L1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8" style:family="paragraph" style:parent-style-name="Text_20_body" style:list-style-name="L1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9" style:family="paragraph" style:parent-style-name="Text_20_body" style:list-style-name="L2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10" style:family="paragraph" style:parent-style-name="Text_20_body" style:list-style-name="L2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11" style:family="paragraph" style:parent-style-name="Text_20_body" style:list-style-name="L3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12" style:family="paragraph" style:parent-style-name="Text_20_body" style:list-style-name="L3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13" style:family="paragraph" style:parent-style-name="Text_20_body" style:list-style-name="L4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14" style:family="paragraph" style:parent-style-name="Text_20_body" style:list-style-name="L4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15" style:family="paragraph" style:parent-style-name="Text_20_body" style:list-style-name="L5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16" style:family="paragraph" style:parent-style-name="Text_20_body" style:list-style-name="L5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17" style:family="paragraph" style:parent-style-name="Text_20_body" style:list-style-name="L6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ext_20_body" style:list-style-name="L6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19" style:family="paragraph" style:parent-style-name="Text_20_body" style:list-style-name="L7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20" style:family="paragraph" style:parent-style-name="Text_20_body" style:list-style-name="L7">
      <style:paragraph-properties fo:margin-top="0.847cm" fo:margin-bottom="0cm" style:contextual-spacing="false" fo:line-height="100%"/>
      <style:text-properties fo:font-size="23pt" fo:font-weight="bold" style:font-size-asian="23pt" style:font-weight-asian="bold" style:font-size-complex="23pt"/>
    </style:style>
    <style:style style:name="P21" style:family="paragraph" style:parent-style-name="Text_20_body" style:list-style-name="L7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22" style:family="paragraph" style:parent-style-name="Text_20_body" style:list-style-name="L8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23" style:family="paragraph" style:parent-style-name="Text_20_body" style:list-style-name="L8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24" style:family="paragraph" style:parent-style-name="Text_20_body" style:list-style-name="L9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25" style:family="paragraph" style:parent-style-name="Text_20_body" style:list-style-name="L9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26" style:family="paragraph" style:parent-style-name="Text_20_body" style:list-style-name="L10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27" style:family="paragraph" style:parent-style-name="Text_20_body" style:list-style-name="L10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28" style:family="paragraph" style:parent-style-name="Text_20_body" style:list-style-name="L11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29" style:family="paragraph" style:parent-style-name="Text_20_body" style:list-style-name="L11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30" style:family="paragraph" style:parent-style-name="Text_20_body" style:list-style-name="L12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31" style:family="paragraph" style:parent-style-name="Text_20_body" style:list-style-name="L12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32" style:family="paragraph" style:parent-style-name="Text_20_body" style:list-style-name="L13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33" style:family="paragraph" style:parent-style-name="Text_20_body" style:list-style-name="L13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34" style:family="paragraph" style:parent-style-name="Text_20_body" style:list-style-name="L14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35" style:family="paragraph" style:parent-style-name="Text_20_body" style:list-style-name="L14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36" style:family="paragraph" style:parent-style-name="Text_20_body" style:list-style-name="L15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37" style:family="paragraph" style:parent-style-name="Text_20_body" style:list-style-name="L15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38" style:family="paragraph" style:parent-style-name="Text_20_body" style:list-style-name="L16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39" style:family="paragraph" style:parent-style-name="Text_20_body" style:list-style-name="L16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40" style:family="paragraph" style:parent-style-name="Text_20_body" style:list-style-name="L17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41" style:family="paragraph" style:parent-style-name="Text_20_body" style:list-style-name="L17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42" style:family="paragraph" style:parent-style-name="Text_20_body" style:list-style-name="L18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43" style:family="paragraph" style:parent-style-name="Text_20_body" style:list-style-name="L18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44" style:family="paragraph" style:parent-style-name="Text_20_body" style:list-style-name="L19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45" style:family="paragraph" style:parent-style-name="Text_20_body" style:list-style-name="L19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46" style:family="paragraph" style:parent-style-name="Text_20_body" style:list-style-name="L20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47" style:family="paragraph" style:parent-style-name="Text_20_body" style:list-style-name="L20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48" style:family="paragraph" style:parent-style-name="Text_20_body" style:list-style-name="L21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49" style:family="paragraph" style:parent-style-name="Text_20_body" style:list-style-name="L21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50" style:family="paragraph" style:parent-style-name="Text_20_body" style:list-style-name="L22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51" style:family="paragraph" style:parent-style-name="Text_20_body" style:list-style-name="L22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52" style:family="paragraph" style:parent-style-name="Text_20_body" style:list-style-name="L23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53" style:family="paragraph" style:parent-style-name="Text_20_body" style:list-style-name="L24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54" style:family="paragraph" style:parent-style-name="Text_20_body" style:list-style-name="L24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55" style:family="paragraph" style:parent-style-name="Text_20_body" style:list-style-name="L25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56" style:family="paragraph" style:parent-style-name="Text_20_body" style:list-style-name="L25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57" style:family="paragraph" style:parent-style-name="Text_20_body" style:list-style-name="L26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58" style:family="paragraph" style:parent-style-name="Text_20_body" style:list-style-name="L26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59" style:family="paragraph" style:parent-style-name="Text_20_body" style:list-style-name="L27">
      <style:paragraph-properties fo:margin-top="0.847cm" fo:margin-bottom="0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60" style:family="paragraph" style:parent-style-name="Text_20_body" style:list-style-name="L27">
      <style:paragraph-properties fo:margin-top="0.847cm" fo:margin-bottom="0.499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61" style:family="paragraph" style:parent-style-name="normal">
      <style:paragraph-properties fo:margin-top="0.847cm" fo:margin-bottom="0.212cm" style:contextual-spacing="false" fo:line-height="100%"/>
      <style:text-properties style:font-name="Georgia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Georgia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📄 Rapport de conduite de projet AI Engineering</text:p>
      <text:p text:style-name="P2"/>
      <text:p text:style-name="P3">1. Contexte et analyse des besoins</text:p>
      <text:p text:style-name="P4">1.1 Présentation</text:p>
      <text:p text:style-name="P5"><text:span text:style-name="T1">Le projet s’inscrit dans un contexte de </text:span><text:span text:style-name="Strong_20_Emphasis"><text:span text:style-name="T1">recherche d’emploi dans le domaine de l’IA (LLM / automatisation)</text:span></text:span><text:span text:style-name="T1"> pour un profil junior disposant d’une expérience préalable de 5 ans en support IT.</text:span></text:p>
      <text:p text:style-name="P5"><text:span text:style-name="T1">L’objectif est de se différencier des candidatures classiques en proposant une </text:span><text:span text:style-name="Strong_20_Emphasis"><text:span text:style-name="T1">interface interactive basée sur un système RAG (Retrieval-Augmented Generation)</text:span></text:span><text:span text:style-name="T1"> intégrée à un site portfolio.</text:span></text:p>
      <text:p text:style-name="P6">Contraintes principales :</text:p>
      <text:list text:style-name="L1">
        <text:list-item>
          <text:p text:style-name="P7">Faible budget (projet personnel) </text:p>
        </text:list-item>
        <text:list-item>
          <text:p text:style-name="P7">Déploiement simple (local puis cloud) </text:p>
        </text:list-item>
        <text:list-item>
          <text:p text:style-name="P7">Données personnelles limitées (expériences, formations) </text:p>
        </text:list-item>
        <text:list-item>
          <text:p text:style-name="P8">Besoin de réponse rapide et pertinente pour un recruteur </text:p>
        </text:list-item>
      </text:list>
      <text:p text:style-name="P5"><text:span text:style-name="T1">Niveau de maturité IA : </text:span><text:span text:style-name="Strong_20_Emphasis"><text:span text:style-name="T1">prototype fonctionnel (POC)</text:span></text:span></text:p>
      <text:p text:style-name="P2"/>
      <text:p text:style-name="P4">1.2 Collecte et analyse du besoin métier</text:p>
      <text:p text:style-name="P5"><text:span text:style-name="Strong_20_Emphasis"><text:span text:style-name="T1">Parties prenantes :</text:span></text:span></text:p>
      <text:list text:style-name="L2">
        <text:list-item>
          <text:p text:style-name="P9"><text:soft-page-break/>Utilisateur principal : recruteur </text:p>
        </text:list-item>
        <text:list-item>
          <text:p text:style-name="P10">Développeur : porteur du projet </text:p>
        </text:list-item>
      </text:list>
      <text:p text:style-name="P5"><text:span text:style-name="Strong_20_Emphasis"><text:span text:style-name="T1">Recueil du besoin :</text:span></text:span></text:p>
      <text:list text:style-name="L3">
        <text:list-item>
          <text:p text:style-name="P11">Réflexion produit personnelle (portfolio différenciant) </text:p>
        </text:list-item>
        <text:list-item>
          <text:p text:style-name="P12">Analyse des attentes recruteurs (clarté, rapidité, impact) </text:p>
        </text:list-item>
      </text:list>
      <text:p text:style-name="P5"><text:span text:style-name="Strong_20_Emphasis"><text:span text:style-name="T1">Objectifs :</text:span></text:span></text:p>
      <text:list text:style-name="L4">
        <text:list-item>
          <text:p text:style-name="P13">Générer des réponses pertinentes sur le profil </text:p>
        </text:list-item>
        <text:list-item>
          <text:p text:style-name="P13">Automatiser la présentation du candidat </text:p>
        </text:list-item>
        <text:list-item>
          <text:p text:style-name="P14">Valoriser les compétences IA via un cas concret </text:p>
        </text:list-item>
      </text:list>
      <text:p text:style-name="P5"><text:span text:style-name="Strong_20_Emphasis"><text:span text:style-name="T1">Contraintes :</text:span></text:span></text:p>
      <text:list text:style-name="L5">
        <text:list-item>
          <text:p text:style-name="P15">Protection des données personnelles (limitées à des infos publiques) </text:p>
        </text:list-item>
        <text:list-item>
          <text:p text:style-name="P15">Maîtrise des coûts API (LLM) </text:p>
        </text:list-item>
        <text:list-item>
          <text:p text:style-name="P16">Temps de réponse acceptable (&lt; quelques secondes) </text:p>
        </text:list-item>
      </text:list>
      <text:p text:style-name="P5"><text:span text:style-name="Strong_20_Emphasis"><text:span text:style-name="T1">Hiérarchisation des besoins :</text:span></text:span></text:p>
      <text:list text:style-name="L6">
        <text:list-item>
          <text:p text:style-name="P17">Haute priorité : pertinence des réponses </text:p>
        </text:list-item>
        <text:list-item>
          <text:p text:style-name="P17">Moyenne : UX (interface Angular) </text:p>
        </text:list-item>
        <text:list-item>
          <text:p text:style-name="P18">Faible : scalabilité (non critique à ce stade) </text:p>
        </text:list-item>
      </text:list>
      <text:p text:style-name="P2"><text:soft-page-break/></text:p>
      <text:p text:style-name="P3">2. Audit de la solution data existante</text:p>
      <text:p text:style-name="P4">2.1 Solution proposée</text:p>
      <text:p text:style-name="P6">Architecture actuelle :</text:p>
      <text:list text:style-name="L7">
        <text:list-item>
          <text:p text:style-name="P19">Frontend : Angular </text:p>
        </text:list-item>
        <text:list-item>
          <text:p text:style-name="P19">Backend : FastAPI </text:p>
        </text:list-item>
        <text:list-item>
          <text:p text:style-name="P19">Base vectorielle : Chroma </text:p>
        </text:list-item>
        <text:list-item>
          <text:p text:style-name="P20"><text:span text:style-name="T1">Embeddings : modèle HuggingFace </text:span><text:span text:style-name="Emphasis"><text:span text:style-name="T1">all-MiniLM-L6-v2</text:span></text:span><text:span text:style-name="T1"> </text:span></text:p>
        </text:list-item>
        <text:list-item>
          <text:p text:style-name="P19">LLM : Mistral (Mistral Small) </text:p>
        </text:list-item>
        <text:list-item>
          <text:p text:style-name="P19">Données : fichier CSV (expériences, formations) </text:p>
        </text:list-item>
        <text:list-item>
          <text:p text:style-name="P21">Déploiement : Docker Compose </text:p>
        </text:list-item>
      </text:list>
      <text:p text:style-name="P6">Flux :</text:p>
      <text:list text:style-name="L8">
        <text:list-item>
          <text:p text:style-name="P22">Chargement des données CSV </text:p>
        </text:list-item>
        <text:list-item>
          <text:p text:style-name="P22">Génération des embeddings </text:p>
        </text:list-item>
        <text:list-item>
          <text:p text:style-name="P22">Stockage dans Chroma </text:p>
        </text:list-item>
        <text:list-item>
          <text:p text:style-name="P22">Requête utilisateur → embedding → recherche top-k </text:p>
        </text:list-item>
        <text:list-item>
          <text:p text:style-name="P23">Injection contexte → LLM → réponse </text:p>
        </text:list-item>
      </text:list>
      <text:p text:style-name="P2"><text:soft-page-break/></text:p>
      <text:p text:style-name="P4">2.2 Évaluation de l’adéquation</text:p>
      <text:p text:style-name="P5"><text:span text:style-name="Strong_20_Emphasis"><text:span text:style-name="T1">Points forts :</text:span></text:span></text:p>
      <text:list text:style-name="L9">
        <text:list-item>
          <text:p text:style-name="P24">Architecture simple et lisible </text:p>
        </text:list-item>
        <text:list-item>
          <text:p text:style-name="P24">Coût maîtrisé </text:p>
        </text:list-item>
        <text:list-item>
          <text:p text:style-name="P24">Déploiement reproductible (Docker) </text:p>
        </text:list-item>
        <text:list-item>
          <text:p text:style-name="P25">Bonne démonstration des concepts RAG </text:p>
        </text:list-item>
      </text:list>
      <text:p text:style-name="P5"><text:span text:style-name="Strong_20_Emphasis"><text:span text:style-name="T1">Limites :</text:span></text:span></text:p>
      <text:list text:style-name="L10">
        <text:list-item>
          <text:p text:style-name="P26">Données limitées (CSV statique) </text:p>
        </text:list-item>
        <text:list-item>
          <text:p text:style-name="P26">Pas de monitoring </text:p>
        </text:list-item>
        <text:list-item>
          <text:p text:style-name="P26">Pas de gestion de charge (rate limiting absent) </text:p>
        </text:list-item>
        <text:list-item>
          <text:p text:style-name="P27">Évaluation automatique absente </text:p>
        </text:list-item>
      </text:list>
      <text:p text:style-name="P2"/>
      <text:p text:style-name="P3">3. Identification d’une solution technique cible</text:p>
      <text:p text:style-name="P4">Comparatif rapide</text:p>
      <text:list text:style-name="L11">
        <text:list-item>
          <text:p text:style-name="P28">Chroma : simple, rapide, adapté prototype </text:p>
        </text:list-item>
        <text:list-item>
          <text:p text:style-name="P28">LanceDB : plus moderne, orienté prod légère </text:p>
        </text:list-item>
        <text:list-item>
          <text:p text:style-name="P29">Qdrant : robuste, scalable </text:p>
        </text:list-item>
      </text:list>
      <text:p text:style-name="P5"><text:soft-page-break/><text:span text:style-name="T1">👉 Choix retenu : </text:span><text:span text:style-name="Strong_20_Emphasis"><text:span text:style-name="T1">Chroma</text:span></text:span><text:span text:style-name="T1"> (cohérent avec prototype et simplicité)</text:span></text:p>
      <text:p text:style-name="P2"/>
      <text:p text:style-name="P4">Architecture cible</text:p>
      <text:p text:style-name="P6">Composants :</text:p>
      <text:list text:style-name="L12">
        <text:list-item>
          <text:p text:style-name="P30">Frontend Angular (UI recruteur) </text:p>
        </text:list-item>
        <text:list-item>
          <text:p text:style-name="P30">API FastAPI (orchestration RAG) </text:p>
        </text:list-item>
        <text:list-item>
          <text:p text:style-name="P30">Base vectorielle Chroma </text:p>
        </text:list-item>
        <text:list-item>
          <text:p text:style-name="P30">LLM Mistral (inférence) </text:p>
        </text:list-item>
        <text:list-item>
          <text:p text:style-name="P31">Docker (orchestration) </text:p>
        </text:list-item>
      </text:list>
      <text:p text:style-name="P6">Sécurité :</text:p>
      <text:list text:style-name="L13">
        <text:list-item>
          <text:p text:style-name="P32">Rate limiting (à implémenter) </text:p>
        </text:list-item>
        <text:list-item>
          <text:p text:style-name="P33">Validation input utilisateur </text:p>
        </text:list-item>
      </text:list>
      <text:p text:style-name="P2"/>
      <text:p text:style-name="P4">Justification des choix</text:p>
      <text:list text:style-name="L14">
        <text:list-item>
          <text:p text:style-name="P34">FastAPI : rapide, adapté API ML </text:p>
        </text:list-item>
        <text:list-item>
          <text:p text:style-name="P34">Chroma : simplicité + local-first </text:p>
        </text:list-item>
        <text:list-item>
          <text:p text:style-name="P34">Mistral : bon compromis coût/performance </text:p>
        </text:list-item>
        <text:list-item>
          <text:p text:style-name="P34">HuggingFace embeddings : gratuit et local </text:p>
        </text:list-item>
        <text:list-item>
          <text:p text:style-name="P35"><text:soft-page-break/>Docker : portabilité </text:p>
        </text:list-item>
      </text:list>
      <text:p text:style-name="P2"/>
      <text:p text:style-name="P4">Cas d’usage</text:p>
      <text:list text:style-name="L15">
        <text:list-item>
          <text:p text:style-name="P36">Répondre aux questions recruteurs </text:p>
        </text:list-item>
        <text:list-item>
          <text:p text:style-name="P36">Présenter automatiquement les expériences </text:p>
        </text:list-item>
        <text:list-item>
          <text:p text:style-name="P37">Mettre en avant compétences techniques </text:p>
        </text:list-item>
      </text:list>
      <text:p text:style-name="P6">Priorisation :</text:p>
      <text:list text:style-name="L16">
        <text:list-item>
          <text:p text:style-name="P38">Cas principal : interaction recruteur (haute valeur) </text:p>
        </text:list-item>
        <text:list-item>
          <text:p text:style-name="P39">Cas secondaires : enrichissement contenu </text:p>
        </text:list-item>
      </text:list>
      <text:p text:style-name="P2"/>
      <text:p text:style-name="P3">4. Stratégie de mise en œuvre</text:p>
      <text:p text:style-name="P4">4.1 Démarche projet</text:p>
      <text:p text:style-name="P6">Phases :</text:p>
      <text:list text:style-name="L17">
        <text:list-item>
          <text:p text:style-name="P40">Conception (choix RAG) </text:p>
        </text:list-item>
        <text:list-item>
          <text:p text:style-name="P40">Développement backend </text:p>
        </text:list-item>
        <text:list-item>
          <text:p text:style-name="P40">Intégration frontend </text:p>
        </text:list-item>
        <text:list-item>
          <text:p text:style-name="P40">Tests manuels </text:p>
        </text:list-item>
        <text:list-item>
          <text:p text:style-name="P41">Déploiement local (Docker) </text:p>
        </text:list-item>
      </text:list>
      <text:p text:style-name="P6"><text:soft-page-break/>Outils :</text:p>
      <text:list text:style-name="L18">
        <text:list-item>
          <text:p text:style-name="P42">Docker </text:p>
        </text:list-item>
        <text:list-item>
          <text:p text:style-name="P42">FastAPI </text:p>
        </text:list-item>
        <text:list-item>
          <text:p text:style-name="P43">Angular </text:p>
        </text:list-item>
      </text:list>
      <text:p text:style-name="P2"/>
      <text:p text:style-name="P4">4.2 Aide à la décision</text:p>
      <text:p text:style-name="P5"><text:span text:style-name="Strong_20_Emphasis"><text:span text:style-name="T1">Risques :</text:span></text:span></text:p>
      <text:list text:style-name="L19">
        <text:list-item>
          <text:p text:style-name="P44">Hallucinations LLM </text:p>
        </text:list-item>
        <text:list-item>
          <text:p text:style-name="P44">Coût API Mistral </text:p>
        </text:list-item>
        <text:list-item>
          <text:p text:style-name="P45">Abus (spam requêtes) </text:p>
        </text:list-item>
      </text:list>
      <text:p text:style-name="P5"><text:span text:style-name="Strong_20_Emphasis"><text:span text:style-name="T1">Mesures :</text:span></text:span></text:p>
      <text:list text:style-name="L20">
        <text:list-item>
          <text:p text:style-name="P46">Prompt contraint </text:p>
        </text:list-item>
        <text:list-item>
          <text:p text:style-name="P46">Rate limiting </text:p>
        </text:list-item>
        <text:list-item>
          <text:p text:style-name="P47">Ajout futur d’évaluation (RAGAS) </text:p>
        </text:list-item>
      </text:list>
      <text:p text:style-name="P5"><text:span text:style-name="Strong_20_Emphasis"><text:span text:style-name="T1">KPI :</text:span></text:span></text:p>
      <text:list text:style-name="L21">
        <text:list-item>
          <text:p text:style-name="P48">Pertinence réponse </text:p>
        </text:list-item>
        <text:list-item>
          <text:p text:style-name="P48">Temps de réponse </text:p>
        </text:list-item>
        <text:list-item>
          <text:p text:style-name="P49">Engagement recruteur </text:p>
        </text:list-item>
      </text:list>
      <text:p text:style-name="P5"><text:soft-page-break/><text:span text:style-name="Strong_20_Emphasis"><text:span text:style-name="T1">Impacts :</text:span></text:span></text:p>
      <text:list text:style-name="L22">
        <text:list-item>
          <text:p text:style-name="P50">RGPD : faible (données publiques) </text:p>
        </text:list-item>
        <text:list-item>
          <text:p text:style-name="P50">Business : différenciation forte </text:p>
        </text:list-item>
        <text:list-item>
          <text:p text:style-name="P51">Technique : projet démonstratif solide </text:p>
        </text:list-item>
      </text:list>
      <text:p text:style-name="P2"/>
      <text:p text:style-name="P3">5. Contrôle et suivi du projet</text:p>
      <text:p text:style-name="P4">5.1 Pilotage</text:p>
      <text:p text:style-name="P6">Méthode :</text:p>
      <text:list text:style-name="L23">
        <text:list-item>
          <text:p text:style-name="P52">Approche itérative (type agile simplifié) </text:p>
        </text:list-item>
      </text:list>
      <text:p text:style-name="P6">Indicateurs :</text:p>
      <text:list text:style-name="L24">
        <text:list-item>
          <text:p text:style-name="P53">Qualité réponses (tests manuels) </text:p>
        </text:list-item>
        <text:list-item>
          <text:p text:style-name="P53">Stabilité API </text:p>
        </text:list-item>
        <text:list-item>
          <text:p text:style-name="P54">Temps de réponse </text:p>
        </text:list-item>
      </text:list>
      <text:p text:style-name="P2"/>
      <text:p text:style-name="P4">5.2 Outils et process</text:p>
      <text:p text:style-name="P6">Tests :</text:p>
      <text:list text:style-name="L25">
        <text:list-item>
          <text:p text:style-name="P55">Tests manuels </text:p>
        </text:list-item>
        <text:list-item>
          <text:p text:style-name="P56">Évolution prévue : RAGAS </text:p>
        </text:list-item>
      </text:list>
      <text:p text:style-name="P6"><text:soft-page-break/>Monitoring (à venir) :</text:p>
      <text:list text:style-name="L26">
        <text:list-item>
          <text:p text:style-name="P57">Logs API </text:p>
        </text:list-item>
        <text:list-item>
          <text:p text:style-name="P58">Métriques latence </text:p>
        </text:list-item>
      </text:list>
      <text:p text:style-name="P2"/>
      <text:p text:style-name="P3">6. Conclusion &amp; recommandations</text:p>
      <text:p text:style-name="P4">Résumé</text:p>
      <text:p text:style-name="P6">Le projet démontre la capacité à :</text:p>
      <text:list text:style-name="L27">
        <text:list-item>
          <text:p text:style-name="P59">concevoir un système RAG complet </text:p>
        </text:list-item>
        <text:list-item>
          <text:p text:style-name="P59">intégrer plusieurs composants (LLM, embeddings, API, frontend) </text:p>
        </text:list-item>
        <text:list-item>
          <text:p text:style-name="P60">répondre à un besoin concret (mise en valeur profil) </text:p>
        </text:list-item>
      </text:list>
      <text:p text:style-name="P6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06T14:48:14.308695400</dc:date>
    <meta:editing-duration>PT23M17S</meta:editing-duration>
    <meta:editing-cycles>1</meta:editing-cycles>
    <meta:document-statistic meta:table-count="0" meta:image-count="0" meta:object-count="0" meta:page-count="9" meta:paragraph-count="136" meta:word-count="684" meta:character-count="4254" meta:non-whitespace-character-count="3706"/>
    <meta:generator>LibreOffice/25.8.5.2$Windows_X86_64 LibreOffice_project/9c8b85f387cc00a89945a79c9e6239f32e450ac2</meta:generator>
  </office:meta>
</office:document-meta>
</file>